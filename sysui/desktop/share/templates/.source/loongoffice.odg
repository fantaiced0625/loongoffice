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默认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1:59:08.036613818</meta:creation-date>
    <meta:generator>LoongOffice/25.8.7.0.0$Linux_LOONGARCH64 LibreOffice_project/78d516d776fb9f7582f3b2175fa43cbc9e9efc59</meta:generator>
    <meta:document-statistic meta:object-count="0"/>
  </office:meta>
</office:document-meta>
</file>