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默认-title">
      <style:graphic-properties fo:min-height="2.629cm" loext:decorative="false"/>
      <style:paragraph-properties style:writing-mode="lr-tb"/>
    </style:style>
    <style:style style:name="pr2" style:family="presentation" style:parent-style-name="默认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默认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1:57:46.851574543</meta:creation-date>
    <meta:generator>LoongOffice/25.8.7.0.0$Linux_LOONGARCH64 LibreOffice_project/78d516d776fb9f7582f3b2175fa43cbc9e9efc59</meta:generator>
    <dc:date>2026-04-08T11:58:15.128071406</dc:date>
    <meta:editing-duration>PT18S</meta:editing-duration>
    <meta:editing-cycles>3</meta:editing-cycles>
    <meta:document-statistic meta:object-count="25"/>
  </office:meta>
</office:document-meta>
</file>